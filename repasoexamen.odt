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cm" fo:margin-bottom="0.247cm" style:contextual-spacing="false" fo:line-height="115%"/>
      <style:text-properties fo:font-size="12pt" style:font-size-asian="12pt" style:font-size-complex="12pt"/>
    </style:style>
    <style:style style:name="P2" style:family="paragraph" style:parent-style-name="Heading_20_2">
      <style:paragraph-properties fo:margin-top="0cm" fo:margin-bottom="0.247cm" style:contextual-spacing="false" fo:line-height="115%"/>
      <style:text-properties fo:font-size="12pt" style:font-size-asian="12pt" style:font-size-complex="12pt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3">
      <style:text-properties fo:font-size="12pt" style:font-size-asian="12pt" style:font-size-complex="12pt"/>
    </style:style>
    <style:style style:name="P7" style:family="paragraph" style:parent-style-name="Text_20_body" style:list-style-name="L4">
      <style:text-properties fo:font-size="12pt" style:font-size-asian="12pt" style:font-size-complex="12pt"/>
    </style:style>
    <style:style style:name="P8" style:family="paragraph" style:parent-style-name="Text_20_body" style:list-style-name="L5"/>
    <style:style style:name="P9" style:family="paragraph" style:parent-style-name="Text_20_body" style:list-style-name="L5">
      <style:text-properties fo:font-size="12pt" style:font-size-asian="12pt" style:font-size-complex="12pt"/>
    </style:style>
    <style:style style:name="P10" style:family="paragraph" style:parent-style-name="Heading_20_1">
      <style:paragraph-properties fo:margin-top="0cm" fo:margin-bottom="0.247cm" style:contextual-spacing="false" fo:line-height="115%" fo:break-before="page"/>
      <style:text-properties fo:font-size="12pt" style:font-size-asian="12pt" style:font-size-complex="12pt"/>
    </style:style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8">
      <style:text-properties fo:font-size="12pt" style:font-size-asian="12pt" style:font-size-complex="12pt"/>
    </style:style>
    <style:style style:name="P15" style:family="paragraph" style:parent-style-name="Text_20_body" style:list-style-name="L9"/>
    <style:style style:name="P16" style:family="paragraph" style:parent-style-name="Text_20_body" style:list-style-name="L9">
      <style:text-properties fo:font-size="12pt" style:font-size-asian="12pt" style:font-size-complex="12pt"/>
    </style:style>
    <style:style style:name="P17" style:family="paragraph" style:parent-style-name="Text_20_body" style:list-style-name="L10">
      <style:text-properties fo:font-size="12pt" style:font-size-asian="12pt" style:font-size-complex="12pt"/>
    </style:style>
    <style:style style:name="P18" style:family="paragraph" style:parent-style-name="Text_20_body" style:list-style-name="L11"/>
    <style:style style:name="P19" style:family="paragraph" style:parent-style-name="Text_20_body" style:list-style-name="L12"/>
    <style:style style:name="P20" style:family="paragraph" style:parent-style-name="Text_20_body" style:list-style-name="L13"/>
    <style:style style:name="P21" style:family="paragraph" style:parent-style-name="Text_20_body" style:list-style-name="L14"/>
    <style:style style:name="P22" style:family="paragraph" style:parent-style-name="Text_20_body" style:list-style-name="L15"/>
    <style:style style:name="P23" style:family="paragraph" style:parent-style-name="Text_20_body" style:list-style-name="L16"/>
    <style:style style:name="P24" style:family="paragraph" style:parent-style-name="Text_20_body" style:list-style-name="L16">
      <style:text-properties fo:font-size="12pt" style:font-size-asian="12pt" style:font-size-complex="12pt"/>
    </style:style>
    <style:style style:name="P25" style:family="paragraph" style:parent-style-name="Text_20_body">
      <style:text-properties fo:font-size="12pt" style:font-size-asian="12pt" style:font-size-complex="12pt"/>
    </style:style>
    <style:style style:name="P26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📘 PDF 1 – Bastionado y Factores de Autenticación</text:h>
      <text:h text:style-name="P2" text:outline-level="2">Resumen ultra corto</text:h>
      <text:list text:style-name="L1">
        <text:list-item>
          <text:p text:style-name="P3"><text:span text:style-name="T1">Trata sobre </text:span><text:span text:style-name="Strong_20_Emphasis"><text:span text:style-name="T1">cómo reducir vulnerabilidades</text:span></text:span><text:span text:style-name="T1"> en sistemas.</text:span></text:p>
        </text:list-item>
        <text:list-item>
          <text:p text:style-name="P3"><text:span text:style-name="T1">Sirve para </text:span><text:span text:style-name="Strong_20_Emphasis"><text:span text:style-name="T1">proteger sistemas y accesos</text:span></text:span><text:span text:style-name="T1">.</text:span></text:p>
        </text:list-item>
        <text:list-item>
          <text:p text:style-name="P3"><text:span text:style-name="T1">Idea clave: </text:span><text:span text:style-name="Strong_20_Emphasis"><text:span text:style-name="T1">seguridad en capas + control de accesos</text:span></text:span><text:span text:style-name="T1">.</text:span></text:p>
        </text:list-item>
      </text:list>
      <text:h text:style-name="P2" text:outline-level="2">Conceptos clave</text:h>
      <text:list text:style-name="L2">
        <text:list-item>
          <text:p text:style-name="P4"><text:span text:style-name="Strong_20_Emphasis"><text:span text:style-name="T1">Bastionado (Hardening):</text:span></text:span><text:span text:style-name="T1"> reducir superficie de ataque.</text:span></text:p>
        </text:list-item>
        <text:list-item>
          <text:p text:style-name="P4"><text:span text:style-name="Strong_20_Emphasis"><text:span text:style-name="T1">Defensa en profundidad:</text:span></text:span><text:span text:style-name="T1"> varias capas de seguridad.</text:span></text:p>
        </text:list-item>
        <text:list-item>
          <text:p text:style-name="P4"><text:span text:style-name="Strong_20_Emphasis"><text:span text:style-name="T1">Mínimo privilegio:</text:span></text:span><text:span text:style-name="T1"> solo permisos necesarios.</text:span></text:p>
        </text:list-item>
        <text:list-item>
          <text:p text:style-name="P4"><text:span text:style-name="Strong_20_Emphasis"><text:span text:style-name="T1">Mínimo punto de exposición:</text:span></text:span><text:span text:style-name="T1"> solo lo imprescindible activo.</text:span></text:p>
        </text:list-item>
        <text:list-item>
          <text:p text:style-name="P4"><text:span text:style-name="Strong_20_Emphasis"><text:span text:style-name="T1">Seguridad activa:</text:span></text:span><text:span text:style-name="T1"> previene ataques.</text:span></text:p>
        </text:list-item>
        <text:list-item>
          <text:p text:style-name="P4"><text:span text:style-name="Strong_20_Emphasis"><text:span text:style-name="T1">Seguridad pasiva:</text:span></text:span><text:span text:style-name="T1"> reduce impacto (backups).</text:span></text:p>
        </text:list-item>
      </text:list>
      <text:h text:style-name="P2" text:outline-level="2">Autenticación (MUY probable examen)</text:h>
      <text:list text:style-name="L3">
        <text:list-item>
          <text:p text:style-name="P5"><text:span text:style-name="Strong_20_Emphasis"><text:span text:style-name="T1">Conocimiento:</text:span></text:span><text:span text:style-name="T1"> algo que sabes → contraseña.</text:span></text:p>
        </text:list-item>
        <text:list-item>
          <text:p text:style-name="P5"><text:span text:style-name="Strong_20_Emphasis"><text:span text:style-name="T1">Posesión:</text:span></text:span><text:span text:style-name="T1"> algo que tienes → token, móvil.</text:span></text:p>
        </text:list-item>
        <text:list-item>
          <text:p text:style-name="P5"><text:span text:style-name="Strong_20_Emphasis"><text:span text:style-name="T1">Inherente:</text:span></text:span><text:span text:style-name="T1"> algo que eres → biometría.</text:span></text:p>
        </text:list-item>
        <text:list-item>
          <text:p text:style-name="P5"><text:span text:style-name="Strong_20_Emphasis"><text:span text:style-name="T1">2FA real:</text:span></text:span><text:span text:style-name="T1"> combina </text:span><text:span text:style-name="Strong_20_Emphasis"><text:span text:style-name="T1">factores distintos</text:span></text:span><text:span text:style-name="T1">.</text:span></text:p>
        </text:list-item>
        <text:list-item>
          <text:p text:style-name="P6">❌ SMS ≠ doble factor real (es “dos pasos”).</text:p>
        </text:list-item>
      </text:list>
      <text:h text:style-name="P2" text:outline-level="2">Chuleta rápida</text:h>
      <text:list text:style-name="L4">
        <text:list-item>
          <text:p text:style-name="P7">Bastionado = reducir riesgos</text:p>
        </text:list-item>
        <text:list-item>
          <text:p text:style-name="P7">3 principios: capas + poco privilegio + poco expuesto</text:p>
        </text:list-item>
        <text:list-item>
          <text:p text:style-name="P7">3 factores: saber / tener / ser</text:p>
        </text:list-item>
        <text:list-item>
          <text:p text:style-name="P7">2FA ≠ SMS</text:p>
        </text:list-item>
      </text:list>
      <text:h text:style-name="P2" text:outline-level="2">Trampas de examen</text:h>
      <text:list text:style-name="L5">
        <text:list-item>
          <text:p text:style-name="P8"><text:span text:style-name="T1">Confundir </text:span><text:span text:style-name="Strong_20_Emphasis"><text:span text:style-name="T1">2 pasos</text:span></text:span><text:span text:style-name="T1"> con </text:span><text:span text:style-name="Strong_20_Emphasis"><text:span text:style-name="T1">2 factores</text:span></text:span></text:p>
        </text:list-item>
        <text:list-item>
          <text:p text:style-name="P9">Pensar que una sola medida es suficiente</text:p>
        </text:list-item>
      </text:list>
      <text:h text:style-name="P1" text:outline-level="1"/>
      <text:h text:style-name="P10" text:outline-level="1">📘 PDF 2 – Contraseñas en Windows</text:h>
      <text:h text:style-name="P2" text:outline-level="2">1️⃣ Resumen ultra corto</text:h>
      <text:list text:style-name="L6">
        <text:list-item>
          <text:p text:style-name="P11"><text:span text:style-name="T1">Trata sobre </text:span><text:span text:style-name="Strong_20_Emphasis"><text:span text:style-name="T1">contraseñas y su gestión en Windows</text:span></text:span><text:span text:style-name="T1">.</text:span></text:p>
        </text:list-item>
        <text:list-item>
          <text:p text:style-name="P11"><text:span text:style-name="T1">Sirve para </text:span><text:span text:style-name="Strong_20_Emphasis"><text:span text:style-name="T1">proteger cuentas y evitar ataques</text:span></text:span><text:span text:style-name="T1">.</text:span></text:p>
        </text:list-item>
        <text:list-item>
          <text:p text:style-name="P11"><text:span text:style-name="T1">Idea clave: </text:span><text:span text:style-name="Strong_20_Emphasis"><text:span text:style-name="T1">contraseñas fuertes + políticas correctas</text:span></text:span><text:span text:style-name="T1">.</text:span></text:p>
        </text:list-item>
      </text:list>
      <text:h text:style-name="P2" text:outline-level="2">2️⃣ Conceptos clave</text:h>
      <text:list text:style-name="L7">
        <text:list-item>
          <text:p text:style-name="P12"><text:span text:style-name="Strong_20_Emphasis"><text:span text:style-name="T1">SAM:</text:span></text:span><text:span text:style-name="T1"> cuentas locales.</text:span></text:p>
        </text:list-item>
        <text:list-item>
          <text:p text:style-name="P12"><text:span text:style-name="Strong_20_Emphasis"><text:span text:style-name="T1">NTDS.dit:</text:span></text:span><text:span text:style-name="T1"> cuentas de dominio.</text:span></text:p>
        </text:list-item>
        <text:list-item>
          <text:p text:style-name="P12"><text:span text:style-name="Strong_20_Emphasis"><text:span text:style-name="T1">LM hash:</text:span></text:span><text:span text:style-name="T1"> OBSOLETO, inseguro.</text:span></text:p>
        </text:list-item>
        <text:list-item>
          <text:p text:style-name="P12"><text:span text:style-name="Strong_20_Emphasis"><text:span text:style-name="T1">NTLM:</text:span></text:span><text:span text:style-name="T1"> más seguro, pero vulnerable si la contraseña es débil.</text:span></text:p>
        </text:list-item>
        <text:list-item>
          <text:p text:style-name="P12"><text:span text:style-name="Strong_20_Emphasis"><text:span text:style-name="T1">Kerberos:</text:span></text:span><text:span text:style-name="T1"> preferido en dominios modernos.</text:span></text:p>
        </text:list-item>
      </text:list>
      <text:h text:style-name="P2" text:outline-level="2">3️⃣ Buenas prácticas (examen)</text:h>
      <text:list text:style-name="L8">
        <text:list-item>
          <text:p text:style-name="P13"><text:span text:style-name="T1">≥ </text:span><text:span text:style-name="Strong_20_Emphasis"><text:span text:style-name="T1">10 caracteres</text:span></text:span></text:p>
        </text:list-item>
        <text:list-item>
          <text:p text:style-name="P14">Mayús + minús + números + símbolos</text:p>
        </text:list-item>
        <text:list-item>
          <text:p text:style-name="P14">❌ No datos personales</text:p>
        </text:list-item>
        <text:list-item>
          <text:p text:style-name="P14">❌ No reutilizar contraseñas</text:p>
        </text:list-item>
        <text:list-item>
          <text:p text:style-name="P14">✔ Usar gestor de contraseñas</text:p>
        </text:list-item>
      </text:list>
      <text:h text:style-name="P2" text:outline-level="2">4️⃣ Políticas en Windows</text:h>
      <text:list text:style-name="L9">
        <text:list-item>
          <text:p text:style-name="P15"><text:span text:style-name="T1">Editor: </text:span><text:span text:style-name="Source_20_Text"><text:span text:style-name="T1">gpedit.msc</text:span></text:span></text:p>
        </text:list-item>
        <text:list-item>
          <text:p text:style-name="P15"><text:span text:style-name="T1">Ruta:<text:line-break/></text:span><text:span text:style-name="Source_20_Text"><text:span text:style-name="T1">Configuración de equipo → Seguridad → Directivas de cuenta</text:span></text:span></text:p>
        </text:list-item>
        <text:list-item>
          <text:p text:style-name="P16">Importante:</text:p>
          <text:list>
            <text:list-item>
              <text:p text:style-name="P16">Complejidad ✔</text:p>
            </text:list-item>
            <text:list-item>
              <text:p text:style-name="P16">Historial ✔</text:p>
            </text:list-item>
            <text:list-item>
              <text:p text:style-name="P16">Bloqueo tras intentos ✔</text:p>
            </text:list-item>
            <text:list-item>
              <text:p text:style-name="P16">Auditoría de inicios ✔</text:p>
            </text:list-item>
          </text:list>
        </text:list-item>
      </text:list>
      <text:h text:style-name="P2" text:outline-level="2">5️⃣ Trampas de examen</text:h>
      <text:list text:style-name="L10">
        <text:list-item>
          <text:p text:style-name="P17">Pensar que NTLM es “seguro siempre”</text:p>
        </text:list-item>
        <text:list-item>
          <text:p text:style-name="P17">No bloquear cuentas tras intentos fallidos</text:p>
        </text:list-item>
        <text:list-item>
          <text:p text:style-name="P17">Dejar auditoría desactivada</text:p>
        </text:list-item>
      </text:list>
      <text:h text:style-name="P1" text:outline-level="1"/>
      <text:h text:style-name="P10" text:outline-level="1">📘 PDF 3 – Contraseñas en Linux</text:h>
      <text:h text:style-name="P2" text:outline-level="2">1️⃣ Resumen ultra corto</text:h>
      <text:list text:style-name="L11">
        <text:list-item>
          <text:p text:style-name="P18"><text:span text:style-name="T1">Trata sobre </text:span><text:span text:style-name="Strong_20_Emphasis"><text:span text:style-name="T1">gestión de usuarios y contraseñas en Linux</text:span></text:span><text:span text:style-name="T1">.</text:span></text:p>
        </text:list-item>
        <text:list-item>
          <text:p text:style-name="P18"><text:span text:style-name="T1">Sirve para </text:span><text:span text:style-name="Strong_20_Emphasis"><text:span text:style-name="T1">controlar accesos y caducidades</text:span></text:span><text:span text:style-name="T1">.</text:span></text:p>
        </text:list-item>
        <text:list-item>
          <text:p text:style-name="P18"><text:span text:style-name="T1">Idea clave: </text:span><text:span text:style-name="Strong_20_Emphasis"><text:span text:style-name="T1">/etc/shadow + PAM</text:span></text:span><text:span text:style-name="T1">.</text:span></text:p>
        </text:list-item>
      </text:list>
      <text:h text:style-name="P2" text:outline-level="2">2️⃣ Ficheros CLAVE</text:h>
      <text:list text:style-name="L12">
        <text:list-item>
          <text:p text:style-name="P19"><text:span text:style-name="Strong_20_Emphasis"><text:span text:style-name="T1">/etc/passwd:</text:span></text:span><text:span text:style-name="T1"> info del usuario (NO contraseñas).</text:span></text:p>
        </text:list-item>
        <text:list-item>
          <text:p text:style-name="P19"><text:span text:style-name="Strong_20_Emphasis"><text:span text:style-name="T1">/etc/shadow:</text:span></text:span><text:span text:style-name="T1"> contraseñas cifradas y caducidad.</text:span></text:p>
        </text:list-item>
        <text:list-item>
          <text:p text:style-name="P19"><text:span text:style-name="Source_20_Text"><text:span text:style-name="T1">!</text:span></text:span><text:span text:style-name="T1"> → cuenta bloqueada</text:span></text:p>
        </text:list-item>
        <text:list-item>
          <text:p text:style-name="P19"><text:span text:style-name="Source_20_Text"><text:span text:style-name="T1">x</text:span></text:span><text:span text:style-name="T1"> → contraseña en shadow</text:span></text:p>
        </text:list-item>
      </text:list>
      <text:h text:style-name="P2" text:outline-level="2">3️⃣ Hashes en Linux (muy preguntable)</text:h>
      <text:list text:style-name="L13">
        <text:list-item>
          <text:p text:style-name="P20"><text:span text:style-name="Source_20_Text"><text:span text:style-name="T1">$1$</text:span></text:span><text:span text:style-name="T1"> MD5 ❌</text:span></text:p>
        </text:list-item>
        <text:list-item>
          <text:p text:style-name="P20"><text:span text:style-name="Source_20_Text"><text:span text:style-name="T1">$5$</text:span></text:span><text:span text:style-name="T1"> SHA-256 ✔</text:span></text:p>
        </text:list-item>
        <text:list-item>
          <text:p text:style-name="P20"><text:span text:style-name="Source_20_Text"><text:span text:style-name="T1">$6$</text:span></text:span><text:span text:style-name="T1"> SHA-512 ✔✔</text:span></text:p>
        </text:list-item>
        <text:list-item>
          <text:p text:style-name="P20"><text:span text:style-name="Strong_20_Emphasis"><text:span text:style-name="T1">Salt:</text:span></text:span><text:span text:style-name="T1"> evita rainbow tables</text:span></text:p>
        </text:list-item>
      </text:list>
      <text:h text:style-name="P2" text:outline-level="2">4️⃣ PAM (Pluggable Authentication Modules)</text:h>
      <text:list text:style-name="L14">
        <text:list-item>
          <text:p text:style-name="P21"><text:span text:style-name="Strong_20_Emphasis"><text:span text:style-name="T1">auth:</text:span></text:span><text:span text:style-name="T1"> autenticación</text:span></text:p>
        </text:list-item>
        <text:list-item>
          <text:p text:style-name="P21"><text:span text:style-name="Strong_20_Emphasis"><text:span text:style-name="T1">account:</text:span></text:span><text:span text:style-name="T1"> estado de cuenta</text:span></text:p>
        </text:list-item>
        <text:list-item>
          <text:p text:style-name="P21"><text:span text:style-name="Strong_20_Emphasis"><text:span text:style-name="T1">password:</text:span></text:span><text:span text:style-name="T1"> cambios de contraseña</text:span></text:p>
        </text:list-item>
        <text:list-item>
          <text:p text:style-name="P21"><text:span text:style-name="Strong_20_Emphasis"><text:span text:style-name="T1">session:</text:span></text:span><text:span text:style-name="T1"> sesiones</text:span></text:p>
        </text:list-item>
        <text:list-item>
          <text:p text:style-name="P21"><text:span text:style-name="T1">Configuración en </text:span><text:span text:style-name="Source_20_Text"><text:span text:style-name="T1">/etc/pam.d/</text:span></text:span></text:p>
        </text:list-item>
      </text:list>
      <text:h text:style-name="P2" text:outline-level="2">5️⃣ Comandos clave</text:h>
      <text:list text:style-name="L15">
        <text:list-item>
          <text:p text:style-name="P22"><text:span text:style-name="Source_20_Text"><text:span text:style-name="T1">chage</text:span></text:span><text:span text:style-name="T1"> → caducidad de contraseñas</text:span></text:p>
          <text:list>
            <text:list-item>
              <text:p text:style-name="P22"><text:span text:style-name="Source_20_Text"><text:span text:style-name="T1">-M</text:span></text:span><text:span text:style-name="T1"> máximo días</text:span></text:p>
            </text:list-item>
            <text:list-item>
              <text:p text:style-name="P22"><text:span text:style-name="Source_20_Text"><text:span text:style-name="T1">-m</text:span></text:span><text:span text:style-name="T1"> mínimo días</text:span></text:p>
            </text:list-item>
            <text:list-item>
              <text:p text:style-name="P22"><text:span text:style-name="Source_20_Text"><text:span text:style-name="T1">-W</text:span></text:span><text:span text:style-name="T1"> aviso</text:span></text:p>
            </text:list-item>
          </text:list>
        </text:list-item>
      </text:list>
      <text:h text:style-name="P2" text:outline-level="2">6️⃣ Trampas de examen</text:h>
      <text:list text:style-name="L16">
        <text:list-item>
          <text:p text:style-name="P23"><text:span text:style-name="T1">Pensar que </text:span><text:span text:style-name="Source_20_Text"><text:span text:style-name="T1">/etc/passwd</text:span></text:span><text:span text:style-name="T1"> guarda contraseñas</text:span></text:p>
        </text:list-item>
        <text:list-item>
          <text:p text:style-name="P24">Usar MD5 o SHA1</text:p>
        </text:list-item>
        <text:list-item>
          <text:p text:style-name="P24">No usar PAM para políticas</text:p>
        </text:list-item>
      </text:list>
      <text:p text:style-name="P25"/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5T22:09:22.078303000</meta:creation-date>
    <dc:date>2025-12-15T22:46:59.575656400</dc:date>
    <meta:editing-duration>PT27M17S</meta:editing-duration>
    <meta:editing-cycles>1</meta:editing-cycles>
    <meta:document-statistic meta:table-count="0" meta:image-count="0" meta:object-count="0" meta:page-count="4" meta:paragraph-count="85" meta:word-count="476" meta:character-count="2664" meta:non-whitespace-character-count="2336"/>
    <meta:generator>LibreOffice/25.8.3.2$Windows_X86_64 LibreOffice_project/8ca8d55c161d602844f5428fa4b58097424e324e</meta:generator>
  </office:meta>
</office:document-meta>
</file>